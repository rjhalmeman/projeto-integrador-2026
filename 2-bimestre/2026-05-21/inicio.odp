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14A871BE2D.jpg" manifest:media-type="image/jpeg"/>
  <manifest:file-entry manifest:full-path="Pictures/10000000000003E800000226A16617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7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title">
      <style:graphic-properties fo:min-height="2.6cm" loext:decorative="false"/>
      <style:paragraph-properties style:writing-mode="lr-tb"/>
    </style:style>
    <style:style style:name="pr6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size="48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72pt" style:font-size-asian="72pt" style:font-size-complex="72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T1" style:family="text">
      <style:text-properties fo:font-size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style="normal" style:font-size-asian="36pt" style:font-style-asian="normal" style:font-size-complex="36pt" style:font-style-complex="normal"/>
    </style:style>
    <style:style style:name="T5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7cm" svg:x="4.5cm" svg:y="3cm" presentation:class="title" presentation:user-transformed="true">
          <draw:text-box>
            <text:p><text:span text:style-name="T1">21/05/2026</text:span></text:p>
          </draw:text-box>
        </draw:frame>
        <draw:frame draw:style-name="gr1" draw:text-style-name="P2" draw:layer="layout" svg:width="1cm" svg:height="0.806cm" svg:x="26.347cm" svg:y="14.224cm">
          <draw:text-box>
            <text:p><text:span text:style-name="T2">/4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Objetivos</text:p>
          </draw:text-box>
        </draw:frame>
        <draw:frame presentation:style-name="pr4" draw:text-style-name="P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3">1) Como sair da armadilha do </text:span><text:span text:style-name="T4">vibe coding</text:span><text:span text:style-name="T3">?</text:span></text:p>
                <text:p><text:span text:style-name="T3"/></text:p>
                <text:p><text:span text:style-name="T3"/></text:p>
              </text:list-item>
              <text:list-item>
                <text:p><text:span text:style-name="T3">2) Apresentar modos eficientes para estudar um assunto novo na era da IA.</text:span></text:p>
              </text:list-item>
            </text:list>
          </draw:text-box>
        </draw:frame>
        <draw:frame draw:style-name="gr1" draw:text-style-name="P2" draw:layer="layout" svg:width="1cm" svg:height="0.806cm" svg:x="26.347cm" svg:y="14.224cm">
          <draw:text-box>
            <text:p><text:span text:style-name="T2">/4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O fim do mundo está sempre na moda...</text:p>
          </draw:text-box>
        </draw:frame>
        <draw:frame draw:style-name="gr3" draw:text-style-name="P5" draw:layer="layout" svg:width="20.547cm" svg:height="11.3cm" svg:x="5.5cm" svg:y="3.2cm">
          <draw:image xlink:href="Pictures/10000000000003E800000226A166173E.png" xlink:type="simple" xlink:show="embed" xlink:actuate="onLoad" draw:mime-type="image/png">
            <text:p/>
          </draw:image>
        </draw:frame>
        <draw:frame draw:style-name="gr1" draw:text-style-name="P2" draw:layer="layout" svg:width="1cm" svg:height="0.806cm" svg:x="26.347cm" svg:y="14.224cm">
          <draw:text-box>
            <text:p><text:span text:style-name="T2">/4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O que normalmente acontece?</text:p>
          </draw:text-box>
        </draw:frame>
        <draw:frame presentation:style-name="pr4" draw:text-style-name="P6" draw:layer="layout" svg:width="7.5cm" svg:height="2.2cm" svg:x="11cm" svg:y="7cm" presentation:class="outline" presentation:user-transformed="true">
          <draw:text-box>
            <text:list text:style-name="L3">
              <text:list-header>
                <text:p><text:span text:style-name="T5">Adaptação ...</text:span></text:p>
              </text:list-header>
            </text:list>
          </draw:text-box>
        </draw:frame>
        <draw:frame draw:style-name="gr1" draw:text-style-name="P2" draw:layer="layout" svg:width="1cm" svg:height="0.806cm" svg:x="26.347cm" svg:y="14.224cm">
          <draw:text-box>
            <text:p><text:span text:style-name="T2">/4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18.5cm" svg:height="4cm" svg:x="6.5cm" svg:y="11.5cm" presentation:class="outline" presentation:user-transformed="true">
          <draw:text-box>
            <text:list text:style-name="L3">
              <text:list-header>
                <text:p text:style-name="P7"><text:span text:style-name="T2"/></text:p>
                <text:p><text:span text:style-name="T2"><text:a xlink:href="https://www.youtube.com/shorts/Ztn0pDeKbsM" xlink:type="simple">https://www.youtube.com/shorts/Ztn0pDeKbsM</text:a></text:span></text:p>
                <text:p><text:span text:style-name="T2"><text:a xlink:href="https://www.youtube.com/watch?v=cAcGrs7RHBM&amp;list=PPSV&amp;t=3s" xlink:type="simple">https://www.youtube.com/watch?v=cAcGrs7RHBM&amp;list=PPSV&amp;t=3s</text:a></text:span><text:span text:style-name="T2"><text:s/></text:span></text:p>
              </text:list-header>
            </text:list>
          </draw:text-box>
        </draw:frame>
        <draw:frame draw:style-name="gr4" draw:text-style-name="P8" draw:layer="layout" svg:width="13.639cm" svg:height="11.124cm" svg:x="7.861cm" svg:y="0.5cm">
          <draw:image xlink:href="Pictures/100000000000050000000414A871BE2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06:36:23.331691825</meta:creation-date>
    <meta:editing-duration>PT22M46S</meta:editing-duration>
    <meta:editing-cycles>6</meta:editing-cycles>
    <meta:generator>LibreOffice/24.2.7.2$Linux_X86_64 LibreOffice_project/420$Build-2</meta:generator>
    <dc:title>DNA</dc:title>
    <dc:date>2026-05-21T07:57:45.155842573</dc:date>
    <meta:document-statistic meta:object-count="125"/>
  </office:meta>
</office:document-meta>
</file>