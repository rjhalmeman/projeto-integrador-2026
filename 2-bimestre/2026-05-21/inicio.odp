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NA-title">
      <style:graphic-properties fo:min-height="7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style:text-properties fo:font-size="48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7cm" svg:x="4.5cm" svg:y="3cm" presentation:class="title" presentation:user-transformed="true">
          <draw:text-box>
            <text:p><text:span text:style-name="T1">21/05/2026</text:span></text:p>
          </draw:text-box>
        </draw:frame>
        <draw:frame draw:style-name="gr1" draw:text-style-name="P3" draw:layer="layout" svg:width="1cm" svg:height="0.806cm" svg:x="26.461cm" svg:y="14.243cm">
          <draw:text-box>
            <text:p text:style-name="P2"><text:span text:style-name="T2">/2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Objetivos</text:p>
          </draw:text-box>
        </draw:frame>
        <draw:frame presentation:style-name="pr4" draw:text-style-name="P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3">1) Como sair da armadilha do </text:span><text:span text:style-name="T4">vibe </text:span><text:span text:style-name="T4">coding</text:span><text:span text:style-name="T3">?</text:span></text:p>
                <text:p><text:span text:style-name="T3"/></text:p>
                <text:p><text:span text:style-name="T3"/></text:p>
              </text:list-item>
              <text:list-item>
                <text:p><text:span text:style-name="T3">2) Apresentar modos eficientes para </text:span><text:span text:style-name="T3">estudar um assunto novo na era da IA.</text:span></text:p>
              </text:list-item>
            </text:list>
          </draw:text-box>
        </draw:frame>
        <draw:frame draw:style-name="gr1" draw:text-style-name="P3" draw:layer="layout" svg:width="1cm" svg:height="0.806cm" svg:x="26.461cm" svg:y="14.243cm">
          <draw:text-box>
            <text:p text:style-name="P2"><text:span text:style-name="T2">/2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06:36:23.331691825</meta:creation-date>
    <meta:editing-duration>PT11M19S</meta:editing-duration>
    <meta:editing-cycles>4</meta:editing-cycles>
    <meta:generator>LibreOffice/24.2.7.2$Linux_X86_64 LibreOffice_project/420$Build-2</meta:generator>
    <dc:title>DNA</dc:title>
    <dc:date>2026-05-21T06:47:44.739436481</dc:date>
    <meta:document-statistic meta:object-count="111"/>
  </office:meta>
</office:document-meta>
</file>